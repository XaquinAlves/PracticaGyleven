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00000012349F62BE7.png" manifest:media-type="image/png"/>
  <manifest:file-entry manifest:full-path="Pictures/100000010000023700000110E6E5CD0C.png" manifest:media-type="image/png"/>
  <manifest:file-entry manifest:full-path="Pictures/10000001000001D300000144C09A74AD.png" manifest:media-type="image/png"/>
  <manifest:file-entry manifest:full-path="Pictures/10000000000001690000008B39F15299.png" manifest:media-type="image/png"/>
  <manifest:file-entry manifest:full-path="Pictures/10000001000001D1000001A3ACA4DC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5pt double #3465a4" fo:border-right="none" fo:border-top="1.55pt double #3465a4" fo:border-bottom="1.5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5pt double #3465a4" fo:border-right="none" fo:border-top="none" fo:border-bottom="1.5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5pt double #3465a4" fo:border-right="1.55pt double #3465a4" fo:border-top="none" fo:border-bottom="1.55pt double #3465a4" style:writing-mode="lr-tb"/>
    </style:style>
    <style:style style:name="Tabla2" style:family="table">
      <style:table-properties style:width="6.172cm" table:align="left"/>
    </style:style>
    <style:style style:name="Tabla2.A" style:family="table-column">
      <style:table-column-properties style:column-width="3.635cm"/>
    </style:style>
    <style:style style:name="Tabla2.B" style:family="table-column">
      <style:table-column-properties style:column-width="2.53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5.935cm" table:align="left"/>
    </style:style>
    <style:style style:name="Tabla3.A" style:family="table-column">
      <style:table-column-properties style:column-width="4.156cm"/>
    </style:style>
    <style:style style:name="Tabla3.B" style:family="table-column">
      <style:table-column-properties style:column-width="1.7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b410a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b410a" officeooo:paragraph-rsid="001b410a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18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19" style:family="paragraph" style:parent-style-name="Text_20_body">
      <style:paragraph-properties fo:line-height="150%"/>
      <style:text-properties style:font-name="Arial" fo:font-size="12pt" fo:language="gl" fo:country="ES" style:font-name-asian="Times New Roman" style:font-size-asian="12pt" style:language-asian="en" style:country-asian="US" style:font-size-complex="12pt"/>
    </style:style>
    <style:style style:name="P20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" fo:font-size="12pt" fo:language="gl" fo:country="ES" style:font-name-asian="Times New Roman" style:font-size-asian="12pt" style:language-asian="en" style:country-asian="US" style:font-size-complex="12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" fo:language="gl" fo:country="ES" style:language-asian="en" style:country-asian="US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3" style:family="paragraph" style:parent-style-name="Título_20_Índices">
      <style:paragraph-properties fo:break-before="page"/>
      <style:text-properties fo:color="#3465a4" loext:opacity="100%" style:font-name="Arial" fo:font-size="18pt" style:font-name-asian="Times New Roman" style:font-size-asian="18pt" style:language-asian="en" style:country-asian="US" style:font-name-complex="Arial" style:font-size-complex="18pt"/>
    </style:style>
    <style:style style:name="P24" style:family="paragraph" style:parent-style-name="Text_20_body">
      <style:text-properties style:font-name="Arial" fo:font-size="12pt" style:font-name-asian="Times New Roman" style:font-size-asian="12pt" style:font-size-complex="12pt"/>
    </style:style>
    <style:style style:name="P25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ítulo_20_Índices">
      <style:paragraph-properties fo:break-before="page"/>
      <style:text-properties fo:color="#3465a4" loext:opacity="100%" style:font-name="Arial"/>
    </style:style>
    <style:style style:name="P28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30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31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2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4" style:family="paragraph" style:parent-style-name="Heading_20_2">
      <style:paragraph-properties fo:margin-top="0.21cm" fo:margin-bottom="0.21cm" style:contextual-spacing="false"/>
    </style:style>
    <style:style style:name="P3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name-asian="Times New Roman" style:font-size-asian="12pt" style:font-style-asian="normal" style:font-size-complex="12pt" style:font-style-complex="normal"/>
    </style:style>
    <style:style style:name="P36" style:family="paragraph" style:parent-style-name="Text_20_body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Heading_20_2">
      <style:text-properties fo:language="gl" fo:country="ES"/>
    </style:style>
    <style:style style:name="P3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39" style:family="paragraph" style:parent-style-name="Text_20_body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name-asian="Times New Roman" style:font-size-asian="12pt" style:font-style-asian="normal" style:font-size-complex="12pt" style:font-style-complex="normal"/>
    </style:style>
    <style:style style:name="P40" style:family="paragraph" style:parent-style-name="Text_20_body" style:list-style-name="L2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Text_20_body" style:list-style-name="L3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Text_20_body" style:list-style-name="L4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Text_20_body" style:list-style-name="L5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Text_20_body" style:list-style-name="L6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Text_20_body" style:list-style-name="L7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Text_20_body" style:list-style-name="L8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48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49" style:family="paragraph" style:parent-style-name="Heading_20_2">
      <style:text-properties officeooo:paragraph-rsid="0009d127"/>
    </style:style>
    <style:style style:name="P50" style:family="paragraph" style:parent-style-name="Heading_20_2">
      <style:paragraph-properties fo:margin-lef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51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Heading_20_2">
      <style:paragraph-properties fo:margin-left="0cm" fo:text-indent="0cm" style:auto-text-indent="false"/>
      <style:text-properties fo:color="#000000" loext:opacity="100%" style:font-name="Arial" fo:font-size="12pt" style:font-size-asian="12pt" style:font-size-complex="12pt" style:font-style-complex="normal"/>
    </style:style>
    <style:style style:name="P53" style:family="paragraph" style:parent-style-name="Normal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54" style:family="paragraph" style:parent-style-name="Normal">
      <style:text-properties style:font-name="Arial"/>
    </style:style>
    <style:style style:name="P55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6" style:family="paragraph" style:parent-style-name="Heading_20_2">
      <style:paragraph-properties fo:margin-left="0cm" fo:margin-top="0cm" fo:margin-bottom="0.499cm" style:contextual-spacing="false" fo:text-indent="0cm" style:auto-text-indent="false"/>
      <style:text-properties fo:color="#000000" loext:opacity="100%" style:font-name="Arial" fo:font-size="12pt" style:font-size-asian="12pt" style:font-size-complex="12pt" style:font-style-complex="normal"/>
    </style:style>
    <style:style style:name="P57" style:family="paragraph" style:parent-style-name="Heading_20_3">
      <style:paragraph-properties fo:margin-top="0cm" fo:margin-bottom="0.499cm" style:contextual-spacing="false"/>
      <style:text-properties fo:color="#000000" loext:opacity="100%" style:font-name="Arial" fo:font-weight="normal" style:font-size-complex="12pt"/>
    </style:style>
    <style:style style:name="P58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Text_20_body" style:list-style-name="L9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Text_20_body" style:list-style-name="L10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63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64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65" style:family="paragraph" style:parent-style-name="Heading_20_2">
      <style:paragraph-properties fo:margin-left="0cm" fo:line-height="150%" fo:text-align="justify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66" style:family="paragraph" style:parent-style-name="Text_20_body" style:list-style-name="L11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Text_20_body" style:list-style-name="L11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Heading_20_2">
      <style:text-properties fo:color="#000000" loext:opacity="100%" style:font-name="Arial" fo:font-size="12pt" style:font-size-asian="12pt" style:font-size-complex="12pt" style:font-style-complex="normal"/>
    </style:style>
    <style:style style:name="P69" style:family="paragraph" style:parent-style-name="Text_20_body" style:list-style-name="L12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0" style:family="paragraph" style:parent-style-name="Text_20_body" style:list-style-name="L12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1" style:family="paragraph" style:parent-style-name="Heading_20_3">
      <style:text-properties fo:color="#000000" loext:opacity="100%" style:font-name="Arial" fo:font-weight="normal" style:font-size-complex="12pt"/>
    </style:style>
    <style:style style:name="P72" style:family="paragraph" style:parent-style-name="Text_20_body" style:list-style-name="L13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Text_20_body" style:list-style-name="L13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4" style:family="paragraph" style:parent-style-name="Text_20_body" style:list-style-name="L14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Text_20_body" style:list-style-name="L14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6" style:family="paragraph" style:parent-style-name="Text_20_body" style:list-style-name="L15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7" style:family="paragraph" style:parent-style-name="Text_20_body" style:list-style-name="L15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8" style:family="paragraph" style:parent-style-name="Text_20_body" style:list-style-name="L16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9" style:family="paragraph" style:parent-style-name="Text_20_body" style:list-style-name="L16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0" style:family="paragraph" style:parent-style-name="Text_20_body" style:list-style-name="L17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1" style:family="paragraph" style:parent-style-name="Text_20_body" style:list-style-name="L17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2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83" style:family="paragraph" style:parent-style-name="Text_20_body" style:list-style-name="L18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4" style:family="paragraph" style:parent-style-name="Text_20_body" style:list-style-name="L18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5" style:family="paragraph" style:parent-style-name="Text_20_body" style:list-style-name="L19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6" style:family="paragraph" style:parent-style-name="Text_20_body" style:list-style-name="L19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7" style:family="paragraph" style:parent-style-name="Text_20_body" style:list-style-name="L20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8" style:family="paragraph" style:parent-style-name="Text_20_body" style:list-style-name="L20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9" style:family="paragraph" style:parent-style-name="Text_20_body" style:list-style-name="L21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0" style:family="paragraph" style:parent-style-name="Text_20_body" style:list-style-name="L21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1" style:family="paragraph" style:parent-style-name="Text_20_body" style:list-style-name="L22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2" style:family="paragraph" style:parent-style-name="Text_20_body" style:list-style-name="L22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3" style:family="paragraph" style:parent-style-name="Text_20_body" style:list-style-name="L23">
      <style:paragraph-properties fo:margin-top="0.212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4" style:family="paragraph" style:parent-style-name="Text_20_body" style:list-style-name="L23">
      <style:paragraph-properties fo:margin-top="0.212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5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9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name-asian="Times New Roman" style:font-size-asian="12pt" style:font-style-asian="normal" style:font-size-complex="12pt" style:font-style-complex="normal"/>
    </style:style>
    <style:style style:name="P97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officeooo:rsid="001b410a" officeooo:paragraph-rsid="001b410a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98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1b410a" style:font-size-asian="14pt" style:font-size-complex="14pt"/>
    </style:style>
    <style:style style:name="P99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officeooo:rsid="001b410a" officeooo:paragraph-rsid="001c09ec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0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officeooo:rsid="001c09ec" officeooo:paragraph-rsid="001c09ec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1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break-before="page"/>
      <style:text-properties fo:color="#000000" loext:opacity="100%" style:font-name="Arial" fo:font-size="12pt" officeooo:rsid="001c09ec" officeooo:paragraph-rsid="001c09ec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2" style:family="paragraph" style:parent-style-name="Heading_20_1">
      <style:text-properties officeooo:paragraph-rsid="0009d127"/>
    </style:style>
    <style:style style:name="P10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name-asian="Times New Roman" style:font-size-asian="12pt" style:font-style-asian="normal" style:font-size-complex="12pt" style:font-style-complex="normal"/>
    </style:style>
    <style:style style:name="P104" style:family="paragraph" style:parent-style-name="Text_20_body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5" style:family="paragraph" style:parent-style-name="Text_20_body" style:list-style-name="L24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6" style:family="paragraph" style:parent-style-name="Text_20_body" style:list-style-name="L24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07" style:family="paragraph" style:parent-style-name="Heading_20_1">
      <style:text-properties style:font-name="Arial" officeooo:paragraph-rsid="0009d127"/>
    </style:style>
    <style:style style:name="P108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b410a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style:font-name="Arial" fo:font-size="12pt" style:font-name-asian="Times New Roman" style:font-size-asian="12pt" style:font-size-complex="12pt"/>
    </style:style>
    <style:style style:name="T9" style:family="text">
      <style:text-properties style:font-name="Arial" fo:language="gl" fo:country="ES"/>
    </style:style>
    <style:style style:name="T10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11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12" style:family="text">
      <style:text-properties style:font-name-asian="Times New Roman"/>
    </style:style>
    <style:style style:name="T13" style:family="text">
      <style:text-properties fo:font-variant="normal" fo:text-transform="none" style:font-name="Arial" fo:language="gl" fo:country="ES" officeooo:rsid="000d8602"/>
    </style:style>
    <style:style style:name="T14" style:family="text">
      <style:text-properties fo:font-variant="normal" fo:text-transform="none" style:font-name="Arial" fo:language="gl" fo:country="ES" officeooo:rsid="0009d127"/>
    </style:style>
    <style:style style:name="T15" style:family="text">
      <style:text-properties fo:font-variant="normal" fo:text-transform="none" style:font-name="Arial" fo:language="gl" fo:country="ES" officeooo:rsid="000fde2e"/>
    </style:style>
    <style:style style:name="T16" style:family="text">
      <style:text-properties fo:font-variant="normal" fo:text-transform="none" style:font-name="Arial" fo:language="gl" fo:country="ES"/>
    </style:style>
    <style:style style:name="T17" style:family="text">
      <style:text-properties fo:font-variant="normal" fo:text-transform="none" fo:language="gl" fo:country="ES" officeooo:rsid="000fde2e"/>
    </style:style>
    <style:style style:name="T18" style:family="text">
      <style:text-properties officeooo:rsid="001c09ec"/>
    </style:style>
    <style:style style:name="T19" style:family="text">
      <style:text-properties fo:font-variant="normal" fo:text-transform="none" fo:language="gl" fo:country="ES" officeooo:rsid="0009d127"/>
    </style:style>
    <style:style style:name="T20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5" text:anchor-type="page" text:anchor-page-number="17" svg:x="2.646cm" svg:y="3.501cm" svg:width="9.737cm" svg:height="7.699cm" draw:z-index="5">
        <draw:image xlink:href="Pictures/10000000000001700000012349F62BE7.png" xlink:type="simple" xlink:show="embed" xlink:actuate="onLoad" draw:mime-type="image/png"/>
      </draw:frame>
      <draw:frame draw:style-name="fr2" draw:name="Imagen4" text:anchor-type="page" text:anchor-page-number="16" svg:x="3.094cm" svg:y="14.37cm" svg:width="15.002cm" svg:height="7.197cm" draw:z-index="4">
        <draw:image xlink:href="Pictures/100000010000023700000110E6E5CD0C.png" xlink:type="simple" xlink:show="embed" xlink:actuate="onLoad" draw:mime-type="image/png"/>
      </draw:frame>
      <draw:frame draw:style-name="fr2" draw:name="Imagen3" text:anchor-type="page" text:anchor-page-number="16" svg:x="3.134cm" svg:y="3.99cm" svg:width="12.356cm" svg:height="8.573cm" draw:z-index="3">
        <draw:image xlink:href="Pictures/10000001000001D300000144C09A74AD.png" xlink:type="simple" xlink:show="embed" xlink:actuate="onLoad" draw:mime-type="image/png"/>
      </draw:frame>
      <draw:frame draw:style-name="fr2" draw:name="Imagen1" text:anchor-type="page" text:anchor-page-number="15" svg:x="4.232cm" svg:y="15.055cm" svg:width="12.303cm" svg:height="11.086cm" draw:z-index="2">
        <draw:image xlink:href="Pictures/10000001000001D1000001A3ACA4DC88.png" xlink:type="simple" xlink:show="embed" xlink:actuate="onLoad" draw:mime-type="image/png"/>
      </draw:frame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NOVADESK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Xaquín Alves González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4">Héctor Gómez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6"/>
          </table:table-cell>
        </table:table-row>
      </table:table>
      <text:p text:style-name="P17">Resum<text:span text:style-name="T6">o</text:span> </text:p>
      <text:p text:style-name="P18">(Máximo 200 a 300 palabras)</text:p>
      <text:p text:style-name="P19">NovaDesk é unha aplicación web desenvolvida co obxectivo de proporcionar unha plataforma centralizada para a xestión documental, autenticación segura de usuarios e integración de servizos externos. O proxecto foi desenvolvido empregando unha arquitectura cliente-servidor moderna baseada en React e TypeScript para o frontend, e Django xunto con Django REST Framework para o backend.</text:p>
      <text:p text:style-name="P20">A aplicación permite aos usuarios autenticarse mediante credenciais seguras e mecanismos de verificación adicional baseados en códigos temporais (TOTP), incrementando así a protección da información almacenada. Ademais, incorpora funcionalidades para a carga, organización e consulta de documentos en formato PDF, facilitando a súa administración mediante unha interface intuitiva e accesible.</text:p>
      <text:p text:style-name="P20">Como valor engadido, o sistema integra servizos externos que permiten obter información actualizada procedente de fontes especializadas, demostrando a capacidade da aplicación para interactuar con APIs de terceiros e ampliar as súas funcionalidades máis aló da xestión documental tradicional.</text:p>
      <text:p text:style-name="P20">O desenvolvemento do proxecto permitiu aplicar coñecementos adquiridos ao longo do ciclo formativo relacionados coa programación web, deseño de interfaces, desenvolvemento de APIs REST, seguridade informática, bases de datos relacionais e integración de servizos externos.</text:p>
      <text:p text:style-name="P21"><text:span text:style-name="Strong_20_Emphasis"><text:span text:style-name="T7">Palabras clave:</text:span></text:span><text:span text:style-name="T7"> Desenvolvemento web, Django, React, Xestión documental, Autenticación segura.</text:span></text:p>
      <text:p text:style-name="P11"/>
      <text:p text:style-name="P22"><text:bookmark-start text:name="_Toc437509152"/></text:p>
      <text:p text:style-name="P23">Abstract</text:p>
      <text:p text:style-name="P24">NovaDesk is a web application designed to provide a centralized platform for document management, secure user authentication and integration with external services. The project follows a modern client-server architecture using React and TypeScript on the frontend and Django with Django REST Framework on the backend.</text:p>
      <text:p text:style-name="P25">The application allows users to authenticate securely through credentials and time-based one-time passwords (TOTP), improving information security. It also includes features for uploading, organizing and managing PDF documents through an intuitive interface.</text:p>
      <text:p text:style-name="P25">Additionally, the system integrates external services through APIs, demonstrating interoperability and scalability. The project applies knowledge related to web development, database management, software architecture, cybersecurity and API integration.</text:p>
      <text:p text:style-name="P26"><text:span text:style-name="Strong_20_Emphasis"><text:span text:style-name="T8">Keywords:</text:span></text:span><text:span text:style-name="T8"> Web Development, Django, React, Document Management, Security.</text:span></text:p>
      <text:p text:style-name="P27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2456_2599850331" text:style-name="Index_20_Link" text:visited-style-name="Index_20_Link"><text:span text:style-name="T9">Introdución<text:tab/>5</text:span></text:a></text:p>
          <text:p text:style-name="P29"><text:a xlink:type="simple" xlink:href="#__RefHeading___Toc2458_2599850331" text:style-name="Index_20_Link" text:visited-style-name="Index_20_Link"><text:span text:style-name="T9">Contexto e xustificación<text:tab/>5</text:span></text:a></text:p>
          <text:p text:style-name="P28"><text:a xlink:type="simple" xlink:href="#__RefHeading___Toc2460_2599850331" text:style-name="Index_20_Link" text:visited-style-name="Index_20_Link"><text:span text:style-name="T9">Obxectivos<text:tab/>6</text:span></text:a></text:p>
          <text:p text:style-name="P29"><text:a xlink:type="simple" xlink:href="#__RefHeading___Toc2462_2599850331" text:style-name="Index_20_Link" text:visited-style-name="Index_20_Link"><text:span text:style-name="T9">Obxectivo xeral<text:tab/>6</text:span></text:a></text:p>
          <text:p text:style-name="P29"><text:a xlink:type="simple" xlink:href="#__RefHeading___Toc2464_2599850331" text:style-name="Index_20_Link" text:visited-style-name="Index_20_Link"><text:span text:style-name="T9">Obxectivos específicos<text:tab/>6</text:span></text:a></text:p>
          <text:p text:style-name="P28"><text:a xlink:type="simple" xlink:href="#__RefHeading___Toc2466_2599850331" text:style-name="Index_20_Link" text:visited-style-name="Index_20_Link"><text:span text:style-name="T9">Fases de traballo<text:tab/>7</text:span></text:a></text:p>
          <text:p text:style-name="P29"><text:a xlink:type="simple" xlink:href="#__RefHeading___Toc2468_2599850331" text:style-name="Index_20_Link" text:visited-style-name="Index_20_Link"><text:span text:style-name="T9">Fase de estudo<text:tab/>7</text:span></text:a></text:p>
          <text:p text:style-name="P30"><text:a xlink:type="simple" xlink:href="#__RefHeading___Toc2470_2599850331" text:style-name="Index_20_Link" text:visited-style-name="Index_20_Link"><text:span text:style-name="T9">Subapartado<text:tab/>7</text:span></text:a></text:p>
          <text:p text:style-name="P30"><text:a xlink:type="simple" xlink:href="#__RefHeading___Toc2472_2599850331" text:style-name="Index_20_Link" text:visited-style-name="Index_20_Link"><text:span text:style-name="T9">Subapartado 1.2<text:tab/>7</text:span></text:a></text:p>
          <text:p text:style-name="P29"><text:a xlink:type="simple" xlink:href="#__RefHeading___Toc2474_2599850331" text:style-name="Index_20_Link" text:visited-style-name="Index_20_Link"><text:span text:style-name="T9"><text:s/>Planificación<text:tab/>7</text:span></text:a></text:p>
          <text:p text:style-name="P29"><text:a xlink:type="simple" xlink:href="#__RefHeading___Toc2476_2599850331" text:style-name="Index_20_Link" text:visited-style-name="Index_20_Link"><text:span text:style-name="T9">Análise e deseño<text:tab/>7</text:span></text:a></text:p>
          <text:p text:style-name="P29"><text:a xlink:type="simple" xlink:href="#__RefHeading___Toc2478_2599850331" text:style-name="Index_20_Link" text:visited-style-name="Index_20_Link"><text:span text:style-name="T9">Desenvolvemento<text:tab/>7</text:span></text:a></text:p>
          <text:p text:style-name="P29"><text:a xlink:type="simple" xlink:href="#__RefHeading___Toc2480_2599850331" text:style-name="Index_20_Link" text:visited-style-name="Index_20_Link"><text:span text:style-name="T9">Documentación<text:tab/>8</text:span></text:a></text:p>
          <text:p text:style-name="P28"><text:a xlink:type="simple" xlink:href="#__RefHeading___Toc2482_2599850331" text:style-name="Index_20_Link" text:visited-style-name="Index_20_Link"><text:span text:style-name="T9">Conclusións<text:tab/>9</text:span></text:a></text:p>
          <text:p text:style-name="P28"><text:a xlink:type="simple" xlink:href="#__RefHeading___Toc2484_2599850331" text:style-name="Index_20_Link" text:visited-style-name="Index_20_Link"><text:span text:style-name="T9">Propostas de mellora e valoración<text:tab/>10</text:span></text:a></text:p>
          <text:p text:style-name="P28"><text:a xlink:type="simple" xlink:href="#__RefHeading___Toc2486_2599850331" text:style-name="Index_20_Link" text:visited-style-name="Index_20_Link"><text:span text:style-name="T9">Bibliografía<text:tab/>11</text:span></text:a></text:p>
        </text:index-body>
      </text:table-of-content>
      <text:p text:style-name="P31"/>
      <text:h text:style-name="P32" text:outline-level="1"><text:bookmark-start text:name="__RefHeading___Toc2456_2599850331"/>Introdución<text:bookmark-end text:name="__RefHeading___Toc2456_2599850331"/></text:h>
      <text:p text:style-name="P33"><text:bookmark text:name="_Toc34675322"/>O avance da transformación dixital provocou que cada vez máis organizacións e usuarios necesiten ferramentas capaces de centralizar a información e facilitar o acceso seguro aos seus recursos dixitais. Neste contexto, a xestión documental converteuse nun aspecto fundamental para garantir a organización, conservación e dispoñibilidade da información.<text:line-break/><text:line-break/>NovaDesk nace coa finalidade de ofrecer unha solución web moderna que permita a autenticación segura dos usuarios, a administración de documentos dixitais e a integración de servizos externos dentro dunha única plataforma. Para acadar este obxectivo empregouse unha arquitectura baseada en tecnoloxías actuais amplamente utilizadas no ámbito profesional.<text:line-break/><text:line-break/>O desenvolvemento deste proxecto permitiu poñer en práctica competencias relacionadas co desenvolvemento full-stack, a creación de APIs REST, o deseño de interfaces de usuario, a seguridade das aplicacións web e a integración de servizos externos.</text:p>
      <text:h text:style-name="P34" text:outline-level="2"><text:bookmark-start text:name="__RefHeading___Toc2458_2599850331"/><text:span text:style-name="Fuente_20_de_20_párrafo_20_predeter."><text:span text:style-name="T10">Contexto </text:span></text:span><text:span text:style-name="Fuente_20_de_20_párrafo_20_predeter."><text:span text:style-name="T11">e</text:span></text:span><text:span text:style-name="Fuente_20_de_20_párrafo_20_predeter."><text:span text:style-name="T10"> </text:span></text:span><text:span text:style-name="Fuente_20_de_20_párrafo_20_predeter."><text:span text:style-name="T11">x</text:span></text:span><text:span text:style-name="Fuente_20_de_20_párrafo_20_predeter."><text:span text:style-name="T10">ustificación</text:span></text:span><text:bookmark-end text:name="__RefHeading___Toc2458_2599850331"/></text:h>
      <text:p text:style-name="P35">Actualmente as empresas demandan solucións que permitan almacenar e consultar información de forma eficiente e segura. O incremento do traballo remoto e da dixitalización documental fai necesario dispoñer de plataformas accesibles desde calquera dispositivo conectado á rede.</text:p>
      <text:p text:style-name="P36">Ademais, a crecente preocupación pola seguridade informática obriga a incorporar mecanismos avanzados de autenticación capaces de reducir o risco de accesos non autorizados.</text:p>
      <text:p text:style-name="P36">NovaDesk pretende responder a estas necesidades mediante unha plataforma que combina xestión documental, autenticación reforzada e integración de información procedente de servizos externos. A realización deste proxecto tamén permitiu explorar tecnoloxías modernas moi demandadas no mercado laboral, contribuíndo á adquisición de competencias profesionais relevantes.</text:p>
      <text:p text:style-name="P33"/>
      <text:h text:style-name="Heading_20_1" text:outline-level="1"><text:bookmark-start text:name="_Toc34675324"/><text:bookmark-start text:name="__RefHeading___Toc2460_2599850331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<text:h text:style-name="P37" text:outline-level="2"><text:bookmark-start text:name="_Toc34675325"/><text:bookmark-start text:name="__RefHeading___Toc2462_2599850331"/>Ob<text:span text:style-name="T6">x</text:span>e<text:span text:style-name="T6">c</text:span>tivo <text:bookmark-end text:name="_Toc34675325"/><text:span text:style-name="T6">xeral</text:span><text:bookmark-end text:name="__RefHeading___Toc2462_2599850331"/></text:h>
      <text:p text:style-name="P38">Deseñar e desenvolver unha aplicación web completa que permita a xestión documental e a autenticación segura dos usuarios mediante unha arquitectura moderna baseada en React e Django.</text:p>
      <text:p text:style-name="P38"/>
      <text:h text:style-name="P37" text:outline-level="2"><text:bookmark-start text:name="_Toc34675326"/><text:bookmark-start text:name="__RefHeading___Toc2464_2599850331"/>Ob<text:span text:style-name="T6">x</text:span>e<text:span text:style-name="T6">c</text:span>tivos específicos<text:bookmark-end text:name="_Toc34675326"/><text:bookmark-end text:name="__RefHeading___Toc2464_2599850331"/></text:h>
      <text:list text:style-name="L1">
        <text:list-item>
          <text:p text:style-name="P39">Desenvolver unha interface web moderna e intuitiva.</text:p>
        </text:list-item>
      </text:list>
      <text:list text:style-name="L2">
        <text:list-item>
          <text:p text:style-name="P40">Implementar unha arquitectura cliente-servidor baseada en API REST.</text:p>
        </text:list-item>
      </text:list>
      <text:list text:style-name="L3">
        <text:list-item>
          <text:p text:style-name="P41">Incorporar mecanismos de autenticación seguros.</text:p>
        </text:list-item>
      </text:list>
      <text:list text:style-name="L4">
        <text:list-item>
          <text:p text:style-name="P42">Integrar verificación mediante códigos temporais (TOTP).</text:p>
        </text:list-item>
      </text:list>
      <text:list text:style-name="L5">
        <text:list-item>
          <text:p text:style-name="P43">Permitir a carga e consulta de documentos PDF.</text:p>
        </text:list-item>
      </text:list>
      <text:list text:style-name="L6">
        <text:list-item>
          <text:p text:style-name="P44">Garantir a persistencia da información mediante unha base de datos relacional.</text:p>
        </text:list-item>
      </text:list>
      <text:list text:style-name="L7">
        <text:list-item>
          <text:p text:style-name="P45">Integrar servizos externos a través de APIs.</text:p>
        </text:list-item>
      </text:list>
      <text:list text:style-name="L8">
        <text:list-item>
          <text:p text:style-name="P46"><text:span text:style-name="T12">Aplicar boas prácticas de desenvolvemento e seguridade. </text:span></text:p>
        </text:list-item>
      </text:list>
      <text:p text:style-name="P47"/>
      <text:p text:style-name="P48"/>
      <text:h text:style-name="Heading_20_1" text:outline-level="1"><text:bookmark-start text:name="__RefHeading___Toc2466_2599850331"/><text:span text:style-name="Fuente_20_de_20_párrafo_20_predeter."><text:span text:style-name="T13">Fases</text:span></text:span><text:span text:style-name="Fuente_20_de_20_párrafo_20_predeter."><text:span text:style-name="T14"> de traba</text:span></text:span><text:span text:style-name="Fuente_20_de_20_párrafo_20_predeter."><text:span text:style-name="T15">ll</text:span></text:span><text:span text:style-name="Fuente_20_de_20_párrafo_20_predeter."><text:span text:style-name="T14">o</text:span></text:span><text:bookmark-end text:name="__RefHeading___Toc2466_2599850331"/></text:h>
      <text:h text:style-name="P49" text:outline-level="2"><text:bookmark-start text:name="_Toc34675328"/><text:bookmark-start text:name="__RefHeading___Toc2468_2599850331"/><text:span text:style-name="Fuente_20_de_20_párrafo_20_predeter."><text:span text:style-name="T14">F</text:span></text:span><text:bookmark-end text:name="_Toc34675328"/><text:span text:style-name="Fuente_20_de_20_párrafo_20_predeter."><text:span text:style-name="T14">ase de estudo</text:span></text:span><text:bookmark-end text:name="__RefHeading___Toc2468_2599850331"/></text:h>
      <text:h text:style-name="P50" text:outline-level="2" text:is-list-header="true">3.1.1 Análise do mercado e oportunidade de negocio</text:h>
      <text:p text:style-name="P51">Nos últimos anos produciuse unha importante transformación dixital tanto nas empresas como nas organizacións públicas. A necesidade de almacenar, compartir e consultar información de maneira rápida e segura converteuse nun requisito fundamental para garantir a competitividade e a eficiencia operativa.</text:p>
      <text:p text:style-name="P51">Moitas organizacións continúan empregando sistemas dispersos para almacenar documentos, utilizando diferentes ferramentas sen unha integración adecuada. Esta situación pode provocar problemas de seguridade, duplicidade de información e dificultades para acceder aos datos cando son necesarios.</text:p>
      <text:p text:style-name="P51">NovaDesk pretende ofrecer unha solución centralizada capaz de combinar funcionalidades de autenticación segura, xestión documental e integración de servizos externos. Esta combinación permite reducir a complexidade da infraestrutura tecnolóxica necesaria para administrar a información dixital.</text:p>
      <text:p text:style-name="P51">O mercado actual demanda cada vez máis solucións SaaS (Software as a Service) que permitan acceder á información desde calquera dispositivo conectado á rede, polo que unha aplicación destas características presenta un importante potencial de adaptación a distintos sectores empresariais.</text:p>
      <text:h text:style-name="P52" text:outline-level="2" text:is-list-header="true">3.1.2 Estudo de viabilidade técnica</text:h>
      <text:p text:style-name="P51">A viabilidade técnica do proxecto foi analizada tendo en conta os coñecementos adquiridos durante o ciclo formativo e a dispoñibilidade de tecnoloxías gratuítas e de código aberto.</text:p>
      <text:p text:style-name="P51">Para o desenvolvemento da aplicación seleccionouse React como framework para a capa cliente debido á súa ampla adopción na industria e á súa capacidade para construír interfaces dinámicas e reutilizables.</text:p>
      <text:p text:style-name="P51"><text:soft-page-break/>No backend escolleuse Django xunto con Django REST Framework pola súa robustez, seguridade e facilidade para construír APIs REST escalables.</text:p>
      <text:p text:style-name="P51">A utilización de MySQL como sistema xestor de bases de datos garante a persistencia da información e proporciona un elevado rendemento para o volume de datos previsto.</text:p>
      <text:p text:style-name="P51">Adicionalmente, a integración de servizos externos mediante APIs REST e o uso de WebSockets para determinadas comunicacións en tempo real demostran a viabilidade da solución desde un punto de vista tecnolóxico.</text:p>
      <text:h text:style-name="P52" text:outline-level="2" text:is-list-header="true">3.1.3 Estudo de viabilidade económica</text:h>
      <text:p text:style-name="P51">Ao tratarse dun proxecto académico desenvolvido con tecnoloxías open source, os custos económicos son reducidos.</text:p>
      <text:p text:style-name="P51">Os principais custos asociados corresponderían a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Custo estimado</text:p>
            </table:table-cell>
          </table:table-row>
        </table:table-header-rows>
        <table:table-row>
          <table:table-cell table:style-name="Tabla2.A1" office:value-type="string">
            <text:p text:style-name="Table_20_Contents">Equipo informático</text:p>
          </table:table-cell>
          <table:table-cell table:style-name="Tabla2.A1" office:value-type="string">
            <text:p text:style-name="Table_20_Contents">Xa dispoñible</text:p>
          </table:table-cell>
        </table:table-row>
        <table:table-row>
          <table:table-cell table:style-name="Tabla2.A1" office:value-type="string">
            <text:p text:style-name="Table_20_Contents">Licenzas software</text:p>
          </table:table-cell>
          <table:table-cell table:style-name="Tabla2.A1" office:value-type="string">
            <text:p text:style-name="Table_20_Contents">0 €</text:p>
          </table:table-cell>
        </table:table-row>
        <table:table-row>
          <table:table-cell table:style-name="Tabla2.A1" office:value-type="string">
            <text:p text:style-name="Table_20_Contents">React</text:p>
          </table:table-cell>
          <table:table-cell table:style-name="Tabla2.A1" office:value-type="string">
            <text:p text:style-name="Table_20_Contents">0 €</text:p>
          </table:table-cell>
        </table:table-row>
        <table:table-row>
          <table:table-cell table:style-name="Tabla2.A1" office:value-type="string">
            <text:p text:style-name="Table_20_Contents">Django</text:p>
          </table:table-cell>
          <table:table-cell table:style-name="Tabla2.A1" office:value-type="string">
            <text:p text:style-name="Table_20_Contents">0 €</text:p>
          </table:table-cell>
        </table:table-row>
        <table:table-row>
          <table:table-cell table:style-name="Tabla2.A1" office:value-type="string">
            <text:p text:style-name="Table_20_Contents">MySQL</text:p>
          </table:table-cell>
          <table:table-cell table:style-name="Tabla2.A1" office:value-type="string">
            <text:p text:style-name="Table_20_Contents">0 €</text:p>
          </table:table-cell>
        </table:table-row>
        <table:table-row>
          <table:table-cell table:style-name="Tabla2.A1" office:value-type="string">
            <text:p text:style-name="Table_20_Contents">GitHub</text:p>
          </table:table-cell>
          <table:table-cell table:style-name="Tabla2.A1" office:value-type="string">
            <text:p text:style-name="Table_20_Contents">0 €</text:p>
          </table:table-cell>
        </table:table-row>
        <table:table-row>
          <table:table-cell table:style-name="Tabla2.A1" office:value-type="string">
            <text:p text:style-name="Table_20_Contents">Dominio web (opcional)</text:p>
          </table:table-cell>
          <table:table-cell table:style-name="Tabla2.A1" office:value-type="string">
            <text:p text:style-name="Table_20_Contents">10-15 €/ano</text:p>
          </table:table-cell>
        </table:table-row>
        <table:table-row>
          <table:table-cell table:style-name="Tabla2.A1" office:value-type="string">
            <text:p text:style-name="Table_20_Contents">Servidor VPS (opcional)</text:p>
          </table:table-cell>
          <table:table-cell table:style-name="Tabla2.A1" office:value-type="string">
            <text:p text:style-name="Table_20_Contents">5-15 €/mes</text:p>
          </table:table-cell>
        </table:table-row>
      </table:table>
      <text:p text:style-name="P51">A análise económica permite concluír que a implantación da solución resulta viable e asumible.</text:p>
      <text:p text:style-name="P53"/>
      <text:p text:style-name="P54"/>
      <text:h text:style-name="Heading_20_2" text:outline-level="2"><text:bookmark-start text:name="__RefHeading___Toc2474_2599850331"/><text:span text:style-name="Fuente_20_de_20_párrafo_20_predeter."><text:span text:style-name="T16"><text:s/></text:span></text:span><text:bookmark-start text:name="_Toc34675331"/><text:span text:style-name="Fuente_20_de_20_párrafo_20_predeter."><text:span text:style-name="T14">P</text:span></text:span><text:bookmark-end text:name="_Toc34675331"/><text:span text:style-name="Fuente_20_de_20_párrafo_20_predeter."><text:span text:style-name="T14">lanificación</text:span></text:span><text:bookmark-end text:name="__RefHeading___Toc2474_2599850331"/></text:h>
      <text:h text:style-name="P55" text:outline-level="2" text:is-list-header="true">3.2.1 Metodoloxía empregada</text:h>
      <text:p text:style-name="P36">Durante o desenvolvemento empregouse unha metodoloxía incremental inspirada nos principios das metodoloxías áxiles.</text:p>
      <text:p text:style-name="P36"><text:soft-page-break/>O proxecto dividiuse en varias iteracións, permitindo implementar funcionalidades progresivamente e validar o correcto funcionamento de cada módulo antes de avanzar ao seguinte.</text:p>
      <text:p text:style-name="P36">Esta aproximación permitiu detectar incidencias de forma temperá e reducir os riscos asociados ao desenvolvemento.</text:p>
      <text:h text:style-name="P56" text:outline-level="2" text:is-list-header="true">3.2.2 Cronograma</text:h>
      <text:p text:style-name="P36">O desenvolvemento realizouse seguindo as seguintes fases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Fase</text:p>
            </table:table-cell>
            <table:table-cell table:style-name="Tabla3.A1" office:value-type="string">
              <text:p text:style-name="Table_20_Heading">Duración</text:p>
            </table:table-cell>
          </table:table-row>
        </table:table-header-rows>
        <table:table-row>
          <table:table-cell table:style-name="Tabla3.A1" office:value-type="string">
            <text:p text:style-name="Table_20_Contents">Estudo inicial</text:p>
          </table:table-cell>
          <table:table-cell table:style-name="Tabla3.A1" office:value-type="string">
            <text:p text:style-name="Table_20_Contents">1 semana</text:p>
          </table:table-cell>
        </table:table-row>
        <table:table-row>
          <table:table-cell table:style-name="Tabla3.A1" office:value-type="string">
            <text:p text:style-name="Table_20_Contents">Deseño da arquitectura</text:p>
          </table:table-cell>
          <table:table-cell table:style-name="Tabla3.A1" office:value-type="string">
            <text:p text:style-name="Table_20_Contents">1 semana</text:p>
          </table:table-cell>
        </table:table-row>
        <table:table-row>
          <table:table-cell table:style-name="Tabla3.A1" office:value-type="string">
            <text:p text:style-name="Table_20_Contents">Desenvolvemento backend</text:p>
          </table:table-cell>
          <table:table-cell table:style-name="Tabla3.A1" office:value-type="string">
            <text:p text:style-name="Table_20_Contents">3 semanas</text:p>
          </table:table-cell>
        </table:table-row>
        <table:table-row>
          <table:table-cell table:style-name="Tabla3.A1" office:value-type="string">
            <text:p text:style-name="Table_20_Contents">Desenvolvemento frontend</text:p>
          </table:table-cell>
          <table:table-cell table:style-name="Tabla3.A1" office:value-type="string">
            <text:p text:style-name="Table_20_Contents">3 semanas</text:p>
          </table:table-cell>
        </table:table-row>
        <table:table-row>
          <table:table-cell table:style-name="Tabla3.A1" office:value-type="string">
            <text:p text:style-name="Table_20_Contents">Integración e probas</text:p>
          </table:table-cell>
          <table:table-cell table:style-name="Tabla3.A1" office:value-type="string">
            <text:p text:style-name="Table_20_Contents">2 semanas</text:p>
          </table:table-cell>
        </table:table-row>
        <table:table-row>
          <table:table-cell table:style-name="Tabla3.A1" office:value-type="string">
            <text:p text:style-name="Table_20_Contents">Documentación</text:p>
          </table:table-cell>
          <table:table-cell table:style-name="Tabla3.A1" office:value-type="string">
            <text:p text:style-name="Table_20_Contents">1 semana</text:p>
          </table:table-cell>
        </table:table-row>
      </table:table>
      <text:h text:style-name="P56" text:outline-level="2" text:is-list-header="true">3.2.3 Recursos empregados</text:h>
      <text:h text:style-name="P57" text:outline-level="3" text:is-list-header="true">Hardware</text:h>
      <text:list text:style-name="L9">
        <text:list-item>
          <text:p text:style-name="P58">Ordenador persoal. </text:p>
        </text:list-item>
        <text:list-item>
          <text:p text:style-name="P58">Conexión a Internet. </text:p>
        </text:list-item>
        <text:list-item>
          <text:p text:style-name="P59">Sistema operativo Windows/Linux. </text:p>
        </text:list-item>
      </text:list>
      <text:h text:style-name="P57" text:outline-level="3" text:is-list-header="true">Software</text:h>
      <text:list text:style-name="L10">
        <text:list-item>
          <text:p text:style-name="P60">Visual Studio Code. </text:p>
        </text:list-item>
        <text:list-item>
          <text:p text:style-name="P60">Git. </text:p>
        </text:list-item>
        <text:list-item>
          <text:p text:style-name="P60">GitHub. </text:p>
        </text:list-item>
        <text:list-item>
          <text:p text:style-name="P60">Python. </text:p>
        </text:list-item>
        <text:list-item>
          <text:p text:style-name="P60">Node.js. </text:p>
        </text:list-item>
        <text:list-item>
          <text:p text:style-name="P60">React. </text:p>
        </text:list-item>
        <text:list-item>
          <text:p text:style-name="P60">Django. </text:p>
        </text:list-item>
        <text:list-item>
          <text:p text:style-name="P60">MySQL. </text:p>
        </text:list-item>
        <text:list-item>
          <text:p text:style-name="P61">Docker</text:p>
        </text:list-item>
      </text:list>
      <text:p text:style-name="P62"/>
      <text:p text:style-name="P63"/>
      <text:h text:style-name="P64" text:outline-level="2"><text:bookmark-start text:name="_Toc34675332"/><text:bookmark-start text:name="__RefHeading___Toc2476_2599850331"/><text:soft-page-break/><text:span text:style-name="Fuente_20_de_20_párrafo_20_predeter."><text:span text:style-name="T14">A</text:span></text:span><text:bookmark-end text:name="_Toc34675332"/><text:span text:style-name="Fuente_20_de_20_párrafo_20_predeter."><text:span text:style-name="T14">náli</text:span></text:span><text:span text:style-name="Fuente_20_de_20_párrafo_20_predeter."><text:span text:style-name="T15">se</text:span></text:span><text:span text:style-name="Fuente_20_de_20_párrafo_20_predeter."><text:span text:style-name="T14"> </text:span></text:span><text:span text:style-name="Fuente_20_de_20_párrafo_20_predeter."><text:span text:style-name="T15">e </text:span></text:span><text:span text:style-name="Fuente_20_de_20_párrafo_20_predeter."><text:span text:style-name="T14">d</text:span></text:span><text:span text:style-name="Fuente_20_de_20_párrafo_20_predeter."><text:span text:style-name="T15">e</text:span></text:span><text:span text:style-name="Fuente_20_de_20_párrafo_20_predeter."><text:span text:style-name="T14">seño</text:span></text:span><text:bookmark-end text:name="__RefHeading___Toc2476_2599850331"/></text:h>
      <text:h text:style-name="P65" text:outline-level="2" text:is-list-header="true">3.3.1 Requisitos funcionais</text:h>
      <text:p text:style-name="P51">O sistema debe permitir:</text:p>
      <text:list text:style-name="L11">
        <text:list-item>
          <text:p text:style-name="P66">Rexistro de usuarios. </text:p>
        </text:list-item>
        <text:list-item>
          <text:p text:style-name="P66">Inicio de sesión. </text:p>
        </text:list-item>
        <text:list-item>
          <text:p text:style-name="P66">Autenticación mediante dobre factor. </text:p>
        </text:list-item>
        <text:list-item>
          <text:p text:style-name="P66">Xestión de sesións. </text:p>
        </text:list-item>
        <text:list-item>
          <text:p text:style-name="P66">Carga de documentos PDF. </text:p>
        </text:list-item>
        <text:list-item>
          <text:p text:style-name="P66">Consulta de documentos. </text:p>
        </text:list-item>
        <text:list-item>
          <text:p text:style-name="P66">Integración con servizos externos. </text:p>
        </text:list-item>
        <text:list-item>
          <text:p text:style-name="P66">Visualización de información actualizada. </text:p>
        </text:list-item>
        <text:list-item>
          <text:p text:style-name="P67">Administración de datos almacenados. </text:p>
        </text:list-item>
      </text:list>
      <text:h text:style-name="P68" text:outline-level="2" text:is-list-header="true">3.3.2 Requisitos non funcionais</text:h>
      <text:p text:style-name="P51">Ademais dos requisitos funcionais, definíronse os seguintes requisitos non funcionais:</text:p>
      <text:list text:style-name="L12">
        <text:list-item>
          <text:p text:style-name="P69">Seguridade. </text:p>
        </text:list-item>
        <text:list-item>
          <text:p text:style-name="P69">Escalabilidade. </text:p>
        </text:list-item>
        <text:list-item>
          <text:p text:style-name="P69">Mantibilidade. </text:p>
        </text:list-item>
        <text:list-item>
          <text:p text:style-name="P69">Usabilidade. </text:p>
        </text:list-item>
        <text:list-item>
          <text:p text:style-name="P69">Portabilidade. </text:p>
        </text:list-item>
        <text:list-item>
          <text:p text:style-name="P70">Rendemento. </text:p>
        </text:list-item>
      </text:list>
      <text:h text:style-name="P68" text:outline-level="2" text:is-list-header="true">3.3.3 Arquitectura do sistema</text:h>
      <text:p text:style-name="P51">A arquitectura segue un modelo de tres capas:</text:p>
      <text:h text:style-name="P71" text:outline-level="3"><text:soft-page-break/>Capa de presentación</text:h>
      <text:p text:style-name="P51">Implementada mediante React e TypeScript.</text:p>
      <text:p text:style-name="P51">Responsabilidades:</text:p>
      <text:list text:style-name="L13">
        <text:list-item>
          <text:p text:style-name="P72">Mostrar información. </text:p>
        </text:list-item>
        <text:list-item>
          <text:p text:style-name="P72">Validar formularios. </text:p>
        </text:list-item>
        <text:list-item>
          <text:p text:style-name="P73">Xestionar a navegación. </text:p>
        </text:list-item>
      </text:list>
      <text:h text:style-name="P71" text:outline-level="3" text:is-list-header="true">Capa de negocio</text:h>
      <text:p text:style-name="P51">Implementada mediante Django.</text:p>
      <text:p text:style-name="P51">Responsabilidades:</text:p>
      <text:list text:style-name="L14">
        <text:list-item>
          <text:p text:style-name="P74">Autenticación. </text:p>
        </text:list-item>
        <text:list-item>
          <text:p text:style-name="P74">Regras de negocio. </text:p>
        </text:list-item>
        <text:list-item>
          <text:p text:style-name="P74">Integración con servizos externos. </text:p>
        </text:list-item>
        <text:list-item>
          <text:p text:style-name="P75">Xestión documental. </text:p>
        </text:list-item>
      </text:list>
      <text:h text:style-name="P71" text:outline-level="3" text:is-list-header="true">Capa de datos</text:h>
      <text:p text:style-name="P51">Implementada mediante MySQL.</text:p>
      <text:p text:style-name="P51">Responsabilidades:</text:p>
      <text:list text:style-name="L15">
        <text:list-item>
          <text:p text:style-name="P76">Almacenamento persistente. </text:p>
        </text:list-item>
        <text:list-item>
          <text:p text:style-name="P76">Integridade da información. </text:p>
        </text:list-item>
        <text:list-item>
          <text:p text:style-name="P77">Consultas e actualizacións. </text:p>
        </text:list-item>
      </text:list>
      <text:h text:style-name="P68" text:outline-level="2" text:is-list-header="true">3.3.4 Deseño da base de datos</text:h>
      <text:p text:style-name="P51">A base de datos foi deseñada para almacenar:</text:p>
      <text:list text:style-name="L16">
        <text:list-item>
          <text:p text:style-name="P78">Usuarios. </text:p>
        </text:list-item>
        <text:list-item>
          <text:p text:style-name="P78">Credenciais. </text:p>
        </text:list-item>
        <text:list-item>
          <text:p text:style-name="P78"><text:soft-page-break/>Configuración de seguridade. </text:p>
        </text:list-item>
        <text:list-item>
          <text:p text:style-name="P78">Documentos. </text:p>
        </text:list-item>
        <text:list-item>
          <text:p text:style-name="P79">Rexistros de actividade. </text:p>
        </text:list-item>
      </text:list>
      <text:p text:style-name="P51">A separación das entidades facilita a normalización dos datos e reduce a duplicidade de información.</text:p>
      <text:h text:style-name="P52" text:outline-level="2" text:is-list-header="true">3.3.5 Deseño da interface</text:h>
      <text:p text:style-name="P51">Durante o deseño da interface perseguíronse os seguintes obxectivos:</text:p>
      <text:list text:style-name="L17">
        <text:list-item>
          <text:p text:style-name="P80">Sinxeleza. </text:p>
        </text:list-item>
        <text:list-item>
          <text:p text:style-name="P80">Claridade visual. </text:p>
        </text:list-item>
        <text:list-item>
          <text:p text:style-name="P80">Adaptabilidade. </text:p>
        </text:list-item>
        <text:list-item>
          <text:p text:style-name="P81">Accesibilidade. </text:p>
        </text:list-item>
      </text:list>
      <text:p text:style-name="P51">Para conseguilo empregouse Tailwind CSS, permitindo construír compoñentes reutilizables e unha experiencia consistente.</text:p>
      <text:p text:style-name="P38"/>
      <text:p text:style-name="P63"/>
      <text:h text:style-name="P82" text:outline-level="2"><text:bookmark-start text:name="__RefHeading___Toc2478_2599850331"/><text:span text:style-name="Fuente_20_de_20_párrafo_20_predeter."><text:span text:style-name="T17">Desenvolvemento</text:span></text:span><text:bookmark-end text:name="__RefHeading___Toc2478_2599850331"/></text:h>
      <text:h text:style-name="P52" text:outline-level="2" text:is-list-header="true">3.4.1 Desenvolvemento do backend</text:h>
      <text:p text:style-name="P51">O backend foi construído utilizando Django e Django REST Framework.</text:p>
      <text:p text:style-name="P51">As principais responsabilidades desta capa son:</text:p>
      <text:list text:style-name="L18">
        <text:list-item>
          <text:p text:style-name="P83">Xestión de usuarios. </text:p>
        </text:list-item>
        <text:list-item>
          <text:p text:style-name="P83">Autenticación. </text:p>
        </text:list-item>
        <text:list-item>
          <text:p text:style-name="P83">Autorización. </text:p>
        </text:list-item>
        <text:list-item>
          <text:p text:style-name="P83">Exposición de servizos REST. </text:p>
        </text:list-item>
        <text:list-item>
          <text:p text:style-name="P83">Comunicación coa base de datos. </text:p>
        </text:list-item>
        <text:list-item>
          <text:p text:style-name="P84"><text:soft-page-break/>Integración con APIs externas. </text:p>
        </text:list-item>
      </text:list>
      <text:h text:style-name="P68" text:outline-level="2" text:is-list-header="true">3.4.2 Sistema de autenticación</text:h>
      <text:p text:style-name="P51">A seguridade constitúe un dos aspectos máis relevantes do proxecto.</text:p>
      <text:p text:style-name="P51">Implementouse un sistema de autenticación baseado en:</text:p>
      <text:list text:style-name="L19">
        <text:list-item>
          <text:p text:style-name="P85">Usuario e contrasinal. </text:p>
        </text:list-item>
        <text:list-item>
          <text:p text:style-name="P85">Tokens de sesión. </text:p>
        </text:list-item>
        <text:list-item>
          <text:p text:style-name="P85">Verificación TOTP. </text:p>
        </text:list-item>
        <text:list-item>
          <text:p text:style-name="P86">Integración con provedores OAuth. </text:p>
        </text:list-item>
      </text:list>
      <text:p text:style-name="P51">Esta aproximación incrementa significativamente a protección fronte a accesos non autorizados.</text:p>
      <text:h text:style-name="P52" text:outline-level="2" text:is-list-header="true">3.4.3 Desenvolvemento do frontend</text:h>
      <text:p text:style-name="P51">O frontend foi desenvolvido empregando React e TypeScript.</text:p>
      <text:p text:style-name="P51">A aplicación estrutúrase mediante compoñentes independentes e reutilizables.</text:p>
      <text:p text:style-name="P51">Entre as principais vantaxes destacan:</text:p>
      <text:list text:style-name="L20">
        <text:list-item>
          <text:p text:style-name="P87">Mantemento simplificado. </text:p>
        </text:list-item>
        <text:list-item>
          <text:p text:style-name="P87">Reutilización de código. </text:p>
        </text:list-item>
        <text:list-item>
          <text:p text:style-name="P87">Mellor organización do proxecto. </text:p>
        </text:list-item>
        <text:list-item>
          <text:p text:style-name="P88">Escalabilidade futura. </text:p>
        </text:list-item>
      </text:list>
      <text:h text:style-name="P68" text:outline-level="2" text:is-list-header="true">3.4.4 Integración de servizos externos</text:h>
      <text:p text:style-name="P51">Un dos aspectos máis interesantes do proxecto é a integración con APIs externas.</text:p>
      <text:p text:style-name="P51">Esta funcionalidade permite obter información actualizada procedente de fontes especializadas e mostralas ao usuario dentro da propia plataforma.</text:p>
      <text:p text:style-name="P51"><text:soft-page-break/>O uso de APIs REST permite desacoplar a aplicación das fontes de datos e facilita futuras integracións.</text:p>
      <text:h text:style-name="P52" text:outline-level="2" text:is-list-header="true">3.4.5 Comunicación en tempo real</text:h>
      <text:p text:style-name="P51">O proxecto incorpora mecanismos de comunicación en tempo real mediante WebSockets.</text:p>
      <text:p text:style-name="P51">Esta tecnoloxía permite intercambiar información entre cliente e servidor sen necesidade de realizar peticións repetitivas, mellorando a experiencia de usuario e reducindo a latencia.</text:p>
      <text:h text:style-name="P52" text:outline-level="2" text:is-list-header="true">3.4.6 Probas realizadas</text:h>
      <text:p text:style-name="P51">Co obxectivo de verificar o correcto funcionamento da aplicación realizáronse diferentes tipos de probas.</text:p>
      <text:h text:style-name="P71" text:outline-level="3">Probas funcionais</text:h>
      <text:list text:style-name="L21">
        <text:list-item>
          <text:p text:style-name="P89">Rexistro de usuarios. </text:p>
        </text:list-item>
        <text:list-item>
          <text:p text:style-name="P89">Inicio de sesión. </text:p>
        </text:list-item>
        <text:list-item>
          <text:p text:style-name="P89">Subida de documentos. </text:p>
        </text:list-item>
        <text:list-item>
          <text:p text:style-name="P90">Consulta de información. </text:p>
        </text:list-item>
      </text:list>
      <text:h text:style-name="P71" text:outline-level="3" text:is-list-header="true">Probas de seguridade</text:h>
      <text:list text:style-name="L22">
        <text:list-item>
          <text:p text:style-name="P91">Validación de credenciais. </text:p>
        </text:list-item>
        <text:list-item>
          <text:p text:style-name="P91">Verificación TOTP. </text:p>
        </text:list-item>
        <text:list-item>
          <text:p text:style-name="P92">Control de permisos. </text:p>
        </text:list-item>
      </text:list>
      <text:h text:style-name="P71" text:outline-level="3" text:is-list-header="true">Probas de integración</text:h>
      <text:list text:style-name="L23">
        <text:list-item>
          <text:p text:style-name="P93">Comunicación frontend-backend. </text:p>
        </text:list-item>
        <text:list-item>
          <text:p text:style-name="P93">Integración coa base de datos. </text:p>
        </text:list-item>
        <text:list-item>
          <text:p text:style-name="P94">Consumo de APIs externas. </text:p>
        </text:list-item>
      </text:list>
      <text:h text:style-name="P71" text:outline-level="3" text:is-list-header="true"><text:soft-page-break/>Resultados</text:h>
      <text:p text:style-name="P51">Os resultados obtidos demostraron o correcto funcionamento da aplicación e o cumprimento dos requisitos definidos durante a fase de análise.</text:p>
      <text:p text:style-name="P38"/>
      <text:p text:style-name="P95"/>
      <text:h text:style-name="P64" text:outline-level="2"><text:bookmark-start text:name="__RefHeading___Toc2480_2599850331"/><text:span text:style-name="Fuente_20_de_20_párrafo_20_predeter."><text:span text:style-name="T14">Documentación</text:span></text:span><text:bookmark-end text:name="__RefHeading___Toc2480_2599850331"/></text:h>
      <text:p text:style-name="P96">Durante todo o desenvolvemento mantívose documentación técnica relativa á estrutura do proxecto, dependencias empregadas, configuración do contorno e funcionamento dos diferentes módulos.</text:p>
      <text:p text:style-name="P51">Esta documentación facilita futuras tarefas de mantemento e evolución da aplicación.</text:p>
      <text:p text:style-name="P97">Diagrama de casos de uso:</text:p>
      <text:p text:style-name="P3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<text:soft-page-break/>Diagrama de <text:span text:style-name="T18">clases UML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Arquitectura do sistema: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Modelo E-R</text:p>
      <text:p text:style-name="P100"/>
      <text:p text:style-name="P48"/>
      <text:h text:style-name="P102" text:outline-level="1"><text:bookmark-start text:name="_Toc34675333"/><text:bookmark-start text:name="__RefHeading___Toc2482_2599850331"/><text:span text:style-name="Fuente_20_de_20_párrafo_20_predeter."><text:span text:style-name="T14">C</text:span></text:span><text:bookmark-end text:name="_Toc34675333"/><text:span text:style-name="Fuente_20_de_20_párrafo_20_predeter."><text:span text:style-name="T14">onclusi</text:span></text:span><text:span text:style-name="Fuente_20_de_20_párrafo_20_predeter."><text:span text:style-name="T15">óns</text:span></text:span><text:bookmark-end text:name="__RefHeading___Toc2482_2599850331"/></text:h>
      <text:p text:style-name="P103">O desenvolvemento de NovaDesk permitiu cumprir o obxectivo principal de construír unha aplicación web funcional baseada nunha arquitectura moderna e escalable.</text:p>
      <text:p text:style-name="P36">Os obxectivos específicos definidos ao inicio do proxecto foron acadados mediante a implementación dunha API REST, un sistema de autenticación reforzado, a integración de servizos externos e unha interface de usuario moderna.</text:p>
      <text:p text:style-name="P104"><text:span text:style-name="T12">Ademais do resultado funcional obtido, o proxecto supuxo unha oportunidade para consolidar coñecementos relacionados co desenvolvemento full-stack, a seguridade web e o deseño de aplicacións distribuídas.</text:span></text:p>
      <text:p text:style-name="P48"/>
      <text:h text:style-name="P102" text:outline-level="1"><text:bookmark-start text:name="_Toc34675345"/><text:bookmark-start text:name="__RefHeading___Toc2484_2599850331"/><text:span text:style-name="Fuente_20_de_20_párrafo_20_predeter."><text:span text:style-name="T14">P</text:span></text:span><text:bookmark-end text:name="_Toc34675345"/><text:span text:style-name="Fuente_20_de_20_párrafo_20_predeter."><text:span text:style-name="T14">rop</text:span></text:span><text:span text:style-name="Fuente_20_de_20_párrafo_20_predeter."><text:span text:style-name="T15">o</text:span></text:span><text:span text:style-name="Fuente_20_de_20_párrafo_20_predeter."><text:span text:style-name="T14">stas de me</text:span></text:span><text:span text:style-name="Fuente_20_de_20_párrafo_20_predeter."><text:span text:style-name="T15">ll</text:span></text:span><text:span text:style-name="Fuente_20_de_20_párrafo_20_predeter."><text:span text:style-name="T14">ora </text:span></text:span><text:span text:style-name="Fuente_20_de_20_párrafo_20_predeter."><text:span text:style-name="T15">e</text:span></text:span><text:span text:style-name="Fuente_20_de_20_párrafo_20_predeter."><text:span text:style-name="T14"> valoración</text:span></text:span><text:bookmark-end text:name="__RefHeading___Toc2484_2599850331"/></text:h>
      <text:p text:style-name="P103">Entre as posibles melloras futuras destacan:</text:p>
      <text:list text:style-name="L24">
        <text:list-item>
          <text:p text:style-name="P105">Implantación dun sistema de roles e permisos.</text:p>
        </text:list-item>
        <text:list-item>
          <text:p text:style-name="P105">Automatización de despregamentos mediante CI/CD.</text:p>
        </text:list-item>
        <text:list-item>
          <text:p text:style-name="P105">Desenvolvemento de probas automatizadas.</text:p>
        </text:list-item>
        <text:list-item>
          <text:p text:style-name="P105">Sistema avanzado de notificacións.</text:p>
        </text:list-item>
        <text:list-item>
          <text:p text:style-name="P105">Mellora da monitorización e rexistro de eventos.</text:p>
        </text:list-item>
        <text:list-item>
          <text:p text:style-name="P106">Optimización da escalabilidade do sistema.</text:p>
        </text:list-item>
      </text:list>
      <text:p text:style-name="P36">A valoración global do proxecto é positiva, xa que permitiu aplicar de forma práctica os coñecementos adquiridos ao longo do ciclo formativo e desenvolver unha solución tecnolóxica completa empregando ferramentas actuais do sector.</text:p>
      <text:p text:style-name="P62"/>
      <text:p text:style-name="P48"/>
      <text:h text:style-name="P107" text:outline-level="1"><text:bookmark-start text:name="__RefHeading___Toc2486_2599850331"/><text:span text:style-name="Fuente_20_de_20_párrafo_20_predeter."><text:span text:style-name="T19">Bibliografía</text:span></text:span><text:bookmark-end text:name="__RefHeading___Toc2486_2599850331"/></text:h>
      <text:p text:style-name="Normal"><text:span text:style-name="Fuente_20_de_20_párrafo_20_predeter."><text:span text:style-name="T20"/></text:span></text:p>
      <text:p text:style-name="P48"/>
      <text:list text:style-name="LFO23">
        <text:list-item>
          <text:p text:style-name="P108"><text:span text:style-name="T21">Título</text:span> d<text:span text:style-name="T6">o</text:span> anex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hyphenation-ladder-count="no-limit" fo:hyphenation-keep="auto" loext:hyphenation-keep-type="column" loext:hyphenation-keep-line="false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 style:master-page-name="">
      <style:paragraph-properties fo:margin-left="1cm" fo:margin-right="0cm" fo:hyphenation-ladder-count="no-limit" fo:hyphenation-keep="auto" loext:hyphenation-keep-type="column" loext:hyphenation-keep-line="false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left="1.251cm" fo:margin-right="0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class="chapter">
      <style:paragraph-properties fo:margin-left="1.501cm" fo:margin-right="0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0fde2e"/>
    </style:style>
    <style:style style:name="MT2" style:family="text">
      <style:text-properties officeooo:rsid="00084c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Nome <text:span text:style-name="MT1">e</text:span> apelidos <text:span text:style-name="MT1">do</text:span><text:span text:style-name="MT2"> alumno/a</text:span></text:p>
        <text:p text:style-name="MP2">Título d<text:span text:style-name="MT1">o</text:span> <text:span text:style-name="MT2">Pro</text:span><text:span text:style-name="MT1">x</text:span><text:span text:style-name="MT2">ecto</text:span></text:p>
        <text:p text:style-name="MP2"/>
        <text:p text:style-name="MP2"/>
      </style:header>
      <style:footer>
        <text:p text:style-name="Página"><text:page-number text:select-page="current">19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dc:title/>
    <dc:subject/>
    <meta:initial-creator>Conchi de Miguel</meta:initial-creator>
    <meta:creation-date>2022-09-10T10:59:00Z</meta:creation-date>
    <dc:date>2026-06-03T18:12:16.961313000</dc:date>
    <meta:print-date>2019-08-05T13:11:00Z</meta:print-date>
    <meta:editing-cycles>14</meta:editing-cycles>
    <meta:editing-duration>PT2H52M12S</meta:editing-duration>
    <meta:document-statistic meta:table-count="3" meta:image-count="5" meta:object-count="0" meta:page-count="21" meta:paragraph-count="258" meta:word-count="2000" meta:character-count="14383" meta:non-whitespace-character-count="12664"/>
    <meta:template xlink:type="simple" xlink:actuate="onRequest" xlink:title="" xlink:href="../plantilla-140922.odt/Normal.dotm"/>
  </office:meta>
</office:document-meta>
</file>